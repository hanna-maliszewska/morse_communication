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DB4000009B004D2E38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pyrus" svg:font-family="Papyrus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Papyrus" fo:font-size="20pt" style:font-size-asian="20pt" style:font-size-complex="20pt"/>
    </style:style>
    <style:style style:name="P2" style:family="paragraph" style:parent-style-name="Standard">
      <style:text-properties style:font-name="Papyrus" officeooo:rsid="00182ede" officeooo:paragraph-rsid="00182ede"/>
    </style:style>
    <style:style style:name="P3" style:family="paragraph" style:parent-style-name="Standard">
      <style:text-properties style:font-name="Papyrus" fo:font-size="14pt" officeooo:rsid="00182ede" officeooo:paragraph-rsid="00182ede" style:font-size-asian="14pt" style:font-size-complex="14pt"/>
    </style:style>
    <style:style style:name="P4" style:family="paragraph" style:parent-style-name="Heading" style:list-style-name="L1"/>
    <style:style style:name="P5" style:family="paragraph" style:parent-style-name="Standard">
      <style:paragraph-properties fo:text-align="justify" style:justify-single-word="false"/>
      <style:text-properties style:font-name="Papyrus" officeooo:rsid="00182ede" officeooo:paragraph-rsid="001b3a28"/>
    </style:style>
    <style:style style:name="P6" style:family="paragraph" style:parent-style-name="Standard">
      <style:text-properties style:font-name="Papyrus" officeooo:rsid="00182ede" officeooo:paragraph-rsid="001b3a28"/>
    </style:style>
    <style:style style:name="P7" style:family="paragraph" style:parent-style-name="Standard" style:list-style-name="L2">
      <style:text-properties style:font-name="Papyrus" officeooo:rsid="00182ede" officeooo:paragraph-rsid="001b3a28"/>
    </style:style>
    <style:style style:name="P8" style:family="paragraph" style:parent-style-name="Standard" style:list-style-name="L2" style:master-page-name="">
      <loext:graphic-properties draw:fill="none"/>
      <style:paragraph-properties fo:margin-left="1cm" fo:margin-right="0cm" fo:text-indent="-0.6cm" style:auto-text-indent="false" style:page-number="auto" fo:background-color="transparent"/>
      <style:text-properties style:font-name="Papyrus" officeooo:rsid="00182ede" officeooo:paragraph-rsid="001b3a28"/>
    </style:style>
    <style:style style:name="P9" style:family="paragraph" style:parent-style-name="Standard" style:list-style-name="L2" style:master-page-name="">
      <loext:graphic-properties draw:fill="none"/>
      <style:paragraph-properties fo:margin-left="1cm" fo:margin-right="0cm" fo:text-indent="-0.6cm" style:auto-text-indent="false" style:page-number="auto" fo:background-color="transparent">
        <style:tab-stops/>
      </style:paragraph-properties>
      <style:text-properties style:font-name="Papyrus" officeooo:rsid="00182ede" officeooo:paragraph-rsid="001b3a28"/>
    </style:style>
    <style:style style:name="P10" style:family="paragraph" style:parent-style-name="Standard">
      <style:text-properties style:font-name="Papyrus" officeooo:rsid="00182ede" officeooo:paragraph-rsid="001a02ba"/>
    </style:style>
    <style:style style:name="P11" style:family="paragraph" style:parent-style-name="Standard" style:list-style-name="L3">
      <style:text-properties style:font-name="Papyrus" officeooo:rsid="00182ede" officeooo:paragraph-rsid="001a02ba"/>
    </style:style>
    <style:style style:name="P12" style:family="paragraph" style:parent-style-name="Standard" style:list-style-name="L4">
      <style:text-properties style:font-name="Papyrus" officeooo:rsid="00182ede" officeooo:paragraph-rsid="001a02ba"/>
    </style:style>
    <style:style style:name="P13" style:family="paragraph" style:parent-style-name="Standard" style:list-style-name="L5">
      <style:text-properties style:font-name="Papyrus" officeooo:rsid="00182ede" officeooo:paragraph-rsid="001a02ba"/>
    </style:style>
    <style:style style:name="P14" style:family="paragraph" style:parent-style-name="Standard" style:list-style-name="L6">
      <style:text-properties style:font-name="Papyrus" officeooo:paragraph-rsid="001a02ba"/>
    </style:style>
    <style:style style:name="P15" style:family="paragraph" style:parent-style-name="Standard">
      <style:text-properties style:font-name="Papyrus" officeooo:paragraph-rsid="001a02ba"/>
    </style:style>
    <style:style style:name="P16" style:family="paragraph" style:parent-style-name="Standard" style:list-style-name="L6">
      <style:text-properties style:font-name="Papyrus" officeooo:rsid="00182ede" officeooo:paragraph-rsid="001a02ba"/>
    </style:style>
    <style:style style:name="P17" style:family="paragraph" style:parent-style-name="Table_20_Contents">
      <style:paragraph-properties fo:text-align="center" style:justify-single-word="false"/>
      <style:text-properties style:font-name="Papyrus" fo:font-weight="bold" officeooo:rsid="001a02ba" officeooo:paragraph-rsid="001a02b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pyrus" officeooo:rsid="001a02ba" officeooo:paragraph-rsid="001a02ba"/>
    </style:style>
    <style:style style:name="P19" style:family="paragraph" style:parent-style-name="Standard">
      <style:text-properties style:font-name="Papyrus" officeooo:rsid="001a02ba" officeooo:paragraph-rsid="001a02ba"/>
    </style:style>
    <style:style style:name="T1" style:family="text">
      <style:text-properties officeooo:rsid="001a02ba"/>
    </style:style>
    <style:style style:name="T2" style:family="text">
      <style:text-properties officeooo:rsid="00182e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iowy translator kodu Morse’a</text:p>
      <text:p text:style-name="P2"/>
      <text:p text:style-name="P3">Autorzy:</text:p>
      <text:p text:style-name="P2">Adrian Aleksandrowicz 254711</text:p>
      <text:p text:style-name="P2">Jakub Maliszewski<text:tab/> <text:s text:c="2"/>254808</text:p>
      <text:p text:style-name="P2">Jakub Muszka (kierownik projektu 💀💀💀💀) 254869</text:p>
      <text:p text:style-name="P2"/>
      <text:list text:style-name="L1">
        <text:list-item>
          <text:p text:style-name="P4">Cel projektu</text:p>
        </text:list-item>
      </text:list>
      <text:p text:style-name="P5">Celem projektu jest realizacja systemu transmisji informacji<text:line-break/>wykorzystującego kod Morse'a oraz komunikację radiową 433 MHz.</text:p>
      <text:p text:style-name="P6">System składa się z dwóch urządzeń:<text:line-break/><text:line-break/>- nadajnika,<text:line-break/>- odbiornika.</text:p>
      <text:p text:style-name="P6"/>
      <text:p text:style-name="P5">Nadajnik umożliwia wprowadzanie informacji za pomocą pojedynczego<text:line-break/>przycisku. Informacja jest interpretowana jako kod Morse'a, następnie<text:line-break/>kodowana i przesyłana drogą radiową.</text:p>
      <text:p text:style-name="P5"><text:line-break/>Odbiornik odbiera komunikat, dekoduje go i prezentuje użytkownikowi<text:line-break/>w postaci tekstowej oraz dźwiękowej.</text:p>
      <text:p text:style-name="P2"/>
      <text:list xml:id="list224659287204487" text:continue-numbering="true" text:style-name="L1">
        <text:list-item>
          <text:p text:style-name="P4">Lista funkcjonalności</text:p>
        </text:list-item>
      </text:list>
      <text:p text:style-name="P6">Zrealizowane funkcjonalności:</text:p>
      <text:p text:style-name="P6"/>
      <text:list text:style-name="L2">
        <text:list-item>
          <text:p text:style-name="P7"><text:s text:c="4"/>Wprowadzanie znaków kodu Morse'a za pomocą przycisku.</text:p>
        </text:list-item>
        <text:list-item>
          <text:p text:style-name="P7"><text:s text:c="4"/>Rozróżnianie kropek i kresek na podstawie czasu przytrzymania.</text:p>
        </text:list-item>
        <text:list-item>
          <text:p text:style-name="P7"><text:s text:c="4"/>Dekodowanie kodu Morse'a do znaków alfabetu łacińskiego.</text:p>
        </text:list-item>
        <text:list-item>
          <text:p text:style-name="P7"><text:s text:c="4"/>Sygnalizacja świetlna poprawnego przetłumaczenia ciągu znaków.</text:p>
        </text:list-item>
        <text:list-item>
          <text:p text:style-name="P7"><text:s text:c="4"/>Regulacja szybkości interpretacji kodu Morse'a.</text:p>
        </text:list-item>
        <text:list-item>
          <text:p text:style-name="P7"><text:s text:c="4"/>Transmisja radiowa 433 MHz pomiędzy urządzeniami.</text:p>
        </text:list-item>
        <text:list-item>
          <text:p text:style-name="P7"><text:s text:c="4"/>Odbiór komunikatów radiowych.</text:p>
        </text:list-item>
        <text:list-item>
          <text:p text:style-name="P7"><text:s text:c="4"/>Wyświetlanie odebranego komunikatu na wyświetlaczu LCD 16x2.</text:p>
        </text:list-item>
        <text:list-item>
          <text:p text:style-name="P7"><text:s text:c="4"/>Sygnalizacja akustyczna odebrania komunikatu.</text:p>
        </text:list-item>
        <text:list-item>
          <text:p text:style-name="P8"><text:s text:c="4"/>Sygnalizacja świetlna poprawnego odbioru komunikatu.</text:p>
        </text:list-item>
        <text:list-item>
          <text:p text:style-name="P9"><text:s text:c="4"/>Zliczanie odebranych komunikatów.</text:p>
        </text:list-item>
      </text:list>
      <text:p text:style-name="P6"/>
      <text:p text:style-name="P2"/>
      <text:list text:continue-list="list224659287204487" text:style-name="L1">
        <text:list-item>
          <text:p text:style-name="P4">Podział obowiązków</text:p>
        </text:list-item>
      </text:list>
      <text:p text:style-name="P2">Adrian Aleksandrowicz (40%)<text:line-break/>- przyniesienie ciastek,<text:line-break/>- ???,<text:line-break/>- ???.<text:line-break/><text:soft-page-break/><text:line-break/>Jakub Maliszewski (30%)<text:line-break/>- obsługa wyświetlacza LCD,<text:line-break/>- testy komunikacji,</text:p>
      <text:p text:style-name="P2">- dokumentacja.<text:line-break/><text:line-break/>Jakub Muszka (30%)<text:line-break/>- przyniesienie piwa,<text:line-break/>- ???,<text:line-break/>- ???.</text:p>
      <text:p text:style-name="P2"/>
      <text:list xml:id="list224658412700159" text:continue-numbering="true" text:style-name="L1">
        <text:list-item>
          <text:p text:style-name="P4">Opis sprzętu</text:p>
        </text:list-item>
      </text:list>
      <text:p text:style-name="P2"><draw:frame draw:style-name="fr1" draw:name="Obraz1" text:anchor-type="char" svg:x="0.088cm" svg:y="0.356cm" svg:width="17cm" svg:height="12.017cm" draw:z-index="0"><draw:image xlink:href="Pictures/1000000100000DB4000009B004D2E383.png" xlink:type="simple" xlink:show="embed" xlink:actuate="onLoad" draw:mime-type="image/png"/></draw:frame></text:p>
      <text:h text:style-name="Heading_20_2" text:outline-level="2"><text:span text:style-name="T1"><text:tab/>4.1. </text:span><text:span text:style-name="T2">Nadajnik</text:span></text:h>
      <text:p text:style-name="P10">Mikrokontroler:<text:line-break/>ATmega328PB (Arduino Nano v3)</text:p>
      <text:p text:style-name="P10"/>
      <text:p text:style-name="P10">Elementy:</text:p>
      <text:list text:style-name="L3">
        <text:list-item>
          <text:p text:style-name="P11">przycisk Morse'a,</text:p>
        </text:list-item>
      </text:list>
      <text:list text:style-name="L4">
        <text:list-item>
          <text:p text:style-name="P12">przycisk zwiększania szybkości,</text:p>
        </text:list-item>
        <text:list-item>
          <text:p text:style-name="P12">przycisk zmniejszania szybkości,</text:p>
        </text:list-item>
        <text:list-item>
          <text:p text:style-name="P12">dioda LED,</text:p>
        </text:list-item>
        <text:list-item>
          <text:p text:style-name="P12">buzzer,</text:p>
        </text:list-item>
        <text:list-item>
          <text:p text:style-name="P12"><text:soft-page-break/>moduł RF FS1000A.</text:p>
        </text:list-item>
      </text:list>
      <text:p text:style-name="P2"/>
      <text:h text:style-name="Heading_20_2" text:outline-level="2"><text:span text:style-name="T1"><text:tab/>4.2. </text:span>Odbiornik</text:h>
      <text:p text:style-name="P10">Mikrokontroler:<text:line-break/>ATmega328PB (Arduino Nano v3)</text:p>
      <text:p text:style-name="P10"/>
      <text:p text:style-name="P10">Elementy:</text:p>
      <text:list text:style-name="L5">
        <text:list-item>
          <text:p text:style-name="P13">odbiornik RF XY-MK,</text:p>
        </text:list-item>
        <text:list-item>
          <text:p text:style-name="P13">wyświetlacz LCD1602 z konwerterem I2C,</text:p>
        </text:list-item>
        <text:list-item>
          <text:p text:style-name="P13">dioda LED,</text:p>
        </text:list-item>
        <text:list-item>
          <text:p text:style-name="P13">buzzer.</text:p>
        </text:list-item>
      </text:list>
      <text:p text:style-name="P10"/>
      <text:list xml:id="list224659150907631" text:continue-list="list224658412700159" text:style-name="L1">
        <text:list-item>
          <text:p text:style-name="P4">Opis działania algorytmu</text:p>
        </text:list-item>
      </text:list>
      <text:p text:style-name="P2"/>
      <text:list text:style-name="L6">
        <text:list-item>
          <text:p text:style-name="P14"><text:span text:style-name="T2">System oczekuje na naciśnięcie przycisku.</text:span></text:p>
        </text:list-item>
      </text:list>
      <text:p text:style-name="P15"/>
      <text:list text:continue-numbering="true" text:style-name="L6">
        <text:list-item>
          <text:p text:style-name="P16">W chwili naciśnięcia zapamiętywany jest czas t0.</text:p>
        </text:list-item>
      </text:list>
      <text:p text:style-name="P10"/>
      <text:list text:continue-numbering="true" text:style-name="L6">
        <text:list-item>
          <text:p text:style-name="P16">W chwili zwolnienia przycisku wyznaczana jest długość impulsu:</text:p>
        </text:list-item>
      </text:list>
      <text:p text:style-name="P10"><text:tab/><text:tab/><text:tab/><text:tab/><text:tab/><text:tab/>Δt = t1 − t0</text:p>
      <text:list text:continue-numbering="true" text:style-name="L6">
        <text:list-item>
          <text:p text:style-name="P16">Jeżeli:</text:p>
        </text:list-item>
      </text:list>
      <text:p text:style-name="P10"/>
      <text:p text:style-name="P10"><text:tab/><text:tab/><text:tab/><text:tab/><text:tab/><text:tab/>Δt &lt; Tm</text:p>
      <text:p text:style-name="P10"/>
      <text:p text:style-name="P10">impuls interpretowany jest jako kropka.</text:p>
      <text:list text:continue-numbering="true" text:style-name="L6">
        <text:list-item>
          <text:p text:style-name="P16">Jeżeli:</text:p>
        </text:list-item>
      </text:list>
      <text:p text:style-name="P10"><text:tab/><text:tab/><text:tab/><text:tab/><text:tab/><text:tab/>Δt ≥ Tm</text:p>
      <text:p text:style-name="P10">impuls interpretowany jest jako kreska.</text:p>
      <text:p text:style-name="P10"/>
      <text:list text:continue-numbering="true" text:style-name="L6">
        <text:list-item>
          <text:p text:style-name="P16">Symbol zapisywany jest w buforze kodu Morse'a.</text:p>
        </text:list-item>
      </text:list>
      <text:p text:style-name="P10"/>
      <text:list text:continue-numbering="true" text:style-name="L6">
        <text:list-item>
          <text:p text:style-name="P16">Jeżeli czas bezczynności przekroczy 0.8 s,</text:p>
        </text:list-item>
      </text:list>
      <text:p text:style-name="P10"/>
      <text:list text:continue-numbering="true" text:style-name="L6">
        <text:list-item>
          <text:p text:style-name="P16">bufor jest dekodowany na znak ASCII.</text:p>
        </text:list-item>
      </text:list>
      <text:p text:style-name="P10"/>
      <text:list text:continue-numbering="true" text:style-name="L6">
        <text:list-item>
          <text:p text:style-name="P16">Znak jest transmitowany drogą radiową.</text:p>
        </text:list-item>
      </text:list>
      <text:p text:style-name="P10"/>
      <text:list text:continue-numbering="true" text:style-name="L6">
        <text:list-item>
          <text:p text:style-name="P16">Odbiornik odbiera komunikat.</text:p>
        </text:list-item>
      </text:list>
      <text:p text:style-name="P10"/>
      <text:list text:continue-numbering="true" text:style-name="L6">
        <text:list-item>
          <text:p text:style-name="P16">Komunikat wyświetlany jest na LCD oraz sygnalizowany</text:p>
        </text:list-item>
      </text:list>
      <text:p text:style-name="P10"/>
      <text:list text:continue-numbering="true" text:style-name="L6">
        <text:list-item>
          <text:p text:style-name="P14"><text:span text:style-name="T2">za pomocą LED i buzzera.</text:span></text:p>
        </text:list-item>
      </text:list>
      <text:p text:style-name="P10"/>
      <text:p text:style-name="P2"/>
      <text:list text:continue-list="list224659150907631" text:style-name="L1">
        <text:list-item>
          <text:p text:style-name="P4"><text:soft-page-break/>Parametry czasowe</text:p>
        </text:list-item>
      </text:list>
      <text:p text:style-name="P2">Czas rozróżnienia kropki i kreski:<text:line-break/>Tm = 0.3 s<text:line-break/><text:line-break/>Czas zakończenia litery:<text:line-break/>Tl = 0.8 s<text:line-break/><text:line-break/>Częstotliwość taktowania MCU:<text:line-break/>16 MHz<text:line-break/><text:line-break/>Napięcie zasilania:<text:line-break/>5 V<text:line-break/><text:line-break/>Częstotliwość transmisji radiowej:<text:line-break/>433.92 MHz</text:p>
      <text:p text:style-name="P2"/>
      <text:list text:continue-numbering="true" text:style-name="L1">
        <text:list-item>
          <text:p text:style-name="P4">Opis peryferiów i rejestrów</text:p>
        </text:list-item>
      </text:list>
      <text:p text:style-name="P2">GPIO</text:p>
      <text:p text:style-name="P2">DDRD<text:line-break/>Konfiguracja kierunku portu.<text:line-break/><text:line-break/>PORTD<text:line-break/>Ustawienie stanu logicznego oraz aktywacja rezystorów<text:line-break/>podciągających.<text:line-break/><text:line-break/>PIND<text:line-break/>Odczyt stanu wejść.</text:p>
      <text:p text:style-name="P2"/>
      <text:p text:style-name="P2">Przykład:</text:p>
      <text:p text:style-name="P2">DDRD |= (1&lt;&lt;DDD6);</text:p>
      <text:p text:style-name="P2">ustawia PD6 jako wyjście.</text:p>
      <text:p text:style-name="P2"/>
      <text:p text:style-name="P2">TWI (I2C)</text:p>
      <text:p text:style-name="P2">TWBR<text:line-break/>Generator częstotliwości magistrali.<text:line-break/><text:line-break/>TWCR<text:line-break/>Sterowanie transmisją.<text:line-break/><text:line-break/>TWDR<text:line-break/>Rejestr danych.<text:line-break/><text:line-break/>TWSR<text:line-break/>Rejestr statusu.</text:p>
      <text:p text:style-name="P2"/>
      <text:p text:style-name="P2">Timer</text:p>
      <text:p text:style-name="P2">Dla millis():</text:p>
      <text:p text:style-name="P6">Pomiar czasu realizowany jest przy użyciu Timer0.<text:line-break/><text:line-break/><text:soft-page-break/>Częstotliwość zegara MCU:<text:line-break/>16 MHz<text:line-break/><text:line-break/>Preskaler:<text:line-break/>64</text:p>
      <text:p text:style-name="P6"/>
      <text:p text:style-name="P5">Przerwanie przepełnienia wykorzystywane jest do aktualizacji licznika czasu systemowego.</text:p>
      <text:p text:style-name="P2"/>
      <text:list text:continue-numbering="true" text:style-name="L1">
        <text:list-item>
          <text:p text:style-name="P4">Komunikacja radiowa</text:p>
        </text:list-item>
      </text:list>
      <text:p text:style-name="P6">Komunikacja realizowana jest przy użyciu transmisji OOK (On-Off Keying) w paśmie 433.92 MHz.</text:p>
      <text:p text:style-name="P6"/>
      <text:p text:style-name="P6">Nadajnik generuje sygnał radiowy odpowiadający</text:p>
      <text:p text:style-name="P6"/>
      <text:p text:style-name="P6">kolejnym bitom transmitowanego komunikatu.</text:p>
      <text:p text:style-name="P6"/>
      <text:p text:style-name="P6">Odbiornik demoduluje sygnał i odtwarza transmitowane dane.</text:p>
      <text:p text:style-name="P6"/>
      <text:p text:style-name="P2"/>
      <text:list text:continue-numbering="true" text:style-name="L1">
        <text:list-item>
          <text:p text:style-name="P4">FMEA</text:p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7">Ryzyko</text:p>
          </table:table-cell>
          <table:table-cell table:style-name="Tabela1.A1" office:value-type="string">
            <text:p text:style-name="P17">P</text:p>
          </table:table-cell>
          <table:table-cell table:style-name="Tabela1.A1" office:value-type="string">
            <text:p text:style-name="P17">S</text:p>
          </table:table-cell>
          <table:table-cell table:style-name="Tabela1.A1" office:value-type="string">
            <text:p text:style-name="P17">D</text:p>
          </table:table-cell>
          <table:table-cell table:style-name="Tabela1.E1" office:value-type="string">
            <text:p text:style-name="P17">Reakcja</text:p>
          </table:table-cell>
        </table:table-row>
        <table:table-row>
          <table:table-cell table:style-name="Tabela1.A2" office:value-type="string">
            <text:p text:style-name="P18">Zablokowany przycisk</text:p>
          </table:table-cell>
          <table:table-cell table:style-name="Tabela1.A2" office:value-type="string">
            <text:p text:style-name="P18">0,2</text:p>
          </table:table-cell>
          <table:table-cell table:style-name="Tabela1.A2" office:value-type="string">
            <text:p text:style-name="P18">6</text:p>
          </table:table-cell>
          <table:table-cell table:style-name="Tabela1.A2" office:value-type="string">
            <text:p text:style-name="P18">8</text:p>
          </table:table-cell>
          <table:table-cell table:style-name="Tabela1.E2" office:value-type="string">
            <text:p text:style-name="P18">Timeout 2s</text:p>
          </table:table-cell>
        </table:table-row>
        <table:table-row>
          <table:table-cell table:style-name="Tabela1.A2" office:value-type="string">
            <text:p text:style-name="P18">Zakłócenia RF</text:p>
          </table:table-cell>
          <table:table-cell table:style-name="Tabela1.A2" office:value-type="string">
            <text:p text:style-name="P18">0,4</text:p>
          </table:table-cell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8">5</text:p>
          </table:table-cell>
          <table:table-cell table:style-name="Tabela1.E2" office:value-type="string">
            <text:p text:style-name="P18">Odrzucenie błędnej ramki</text:p>
          </table:table-cell>
        </table:table-row>
        <table:table-row>
          <table:table-cell table:style-name="Tabela1.A2" office:value-type="string">
            <text:p text:style-name="P18">Nieznany kod Morse’a</text:p>
          </table:table-cell>
          <table:table-cell table:style-name="Tabela1.A2" office:value-type="string">
            <text:p text:style-name="P18">0,3</text:p>
          </table:table-cell>
          <table:table-cell table:style-name="Tabela1.A2" office:value-type="string">
            <text:p text:style-name="P18">3</text:p>
          </table:table-cell>
          <table:table-cell table:style-name="Tabela1.A2" office:value-type="string">
            <text:p text:style-name="P18">10</text:p>
          </table:table-cell>
          <table:table-cell table:style-name="Tabela1.E2" office:value-type="string">
            <text:p text:style-name="P18">Wyświetlenie „?”</text:p>
          </table:table-cell>
        </table:table-row>
        <table:table-row>
          <table:table-cell table:style-name="Tabela1.A2" office:value-type="string">
            <text:p text:style-name="P18">Przepełnienie LCD</text:p>
          </table:table-cell>
          <table:table-cell table:style-name="Tabela1.A2" office:value-type="string">
            <text:p text:style-name="P18">0,5</text:p>
          </table:table-cell>
          <table:table-cell table:style-name="Tabela1.A2" office:value-type="string">
            <text:p text:style-name="P18">2</text:p>
          </table:table-cell>
          <table:table-cell table:style-name="Tabela1.A2" office:value-type="string">
            <text:p text:style-name="P18">10</text:p>
          </table:table-cell>
          <table:table-cell table:style-name="Tabela1.E2" office:value-type="string">
            <text:p text:style-name="P18">Czyszczenie ekranu</text:p>
          </table:table-cell>
        </table:table-row>
      </table:table>
      <text:p text:style-name="P2"/>
      <text:list text:continue-numbering="true" text:style-name="L1">
        <text:list-item>
          <text:p text:style-name="P4">Dokumentacja kodu</text:p>
        </text:list-item>
      </text:list>
      <text:p text:style-name="P19">Chcemy coś w tym stylu przed każdą funkcją</text:p>
      <text:p text:style-name="P19">/*!<text:line-break/>* @brief Dekodowanie ciągu Morse'a.<text:line-break/>*<text:line-break/>* @param code Wskaźnik na ciąg znaków '.' i '-'.<text:line-break/>*<text:line-break/>* @return Znak ASCII lub '?'.<text:line-break/>*/<text:line-break/>char DecodeMorse(const char* code);</text:p>
      <text:p text:style-name="P19"/>
      <text:list text:continue-numbering="true" text:style-name="L1">
        <text:list-item>
          <text:p text:style-name="P4"><text:soft-page-break/>Bibliografia</text:p>
        </text:list-item>
      </text:list>
      <text:p text:style-name="P19">[1] ATmega328P Datasheet<text:line-break/>[2] ATmega328PB Datasheet<text:line-break/>[3] HD44780 Datasheet<text:line-break/>[4] PCF8574 Datasheet<text:line-break/>[5] Dokumentacja magistrali I2C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pyrus" svg:font-family="Papyru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apyrus" fo:font-family="Papyrus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1T22:13:37.279704200</meta:creation-date>
    <dc:date>2026-06-01T22:46:58.297411600</dc:date>
    <meta:editing-duration>PT8M16S</meta:editing-duration>
    <meta:editing-cycles>1</meta:editing-cycles>
    <meta:document-statistic meta:table-count="1" meta:image-count="1" meta:object-count="0" meta:page-count="6" meta:paragraph-count="111" meta:word-count="573" meta:character-count="4032" meta:non-whitespace-character-count="3531"/>
    <meta:generator>LibreOffice/25.8.6.2$Windows_X86_64 LibreOffice_project/b4b39682cd9868fa725bc664aff94278d315bd04</meta:generator>
  </office:meta>
</office:document-meta>
</file>